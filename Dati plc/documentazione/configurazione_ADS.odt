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3000001C8953D632C.png" manifest:media-type="image/png"/>
  <manifest:file-entry manifest:full-path="Pictures/100000010000077F000004AF23588025.png" manifest:media-type="image/png"/>
  <manifest:file-entry manifest:full-path="Pictures/1000000100000250000002101AA0AF18.png" manifest:media-type="image/png"/>
  <manifest:file-entry manifest:full-path="Pictures/10000000000002EA0000019EB4A89317.png" manifest:media-type="image/png"/>
  <manifest:file-entry manifest:full-path="Pictures/1000000100000698000003130B3B9CF0.png" manifest:media-type="image/png"/>
  <manifest:file-entry manifest:full-path="Pictures/10000000000002DB000001CD5C95F13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a70" officeooo:paragraph-rsid="0018aa70"/>
    </style:style>
    <style:style style:name="P2" style:family="paragraph" style:parent-style-name="Standard">
      <style:text-properties officeooo:rsid="00198a69" officeooo:paragraph-rsid="00198a69"/>
    </style:style>
    <style:style style:name="P3" style:family="paragraph" style:parent-style-name="Standard">
      <style:text-properties officeooo:rsid="001b5a24" officeooo:paragraph-rsid="001b5a24"/>
    </style:style>
    <style:style style:name="P4" style:family="paragraph" style:parent-style-name="Standard">
      <style:text-properties officeooo:rsid="00238080" officeooo:paragraph-rsid="00238080"/>
    </style:style>
    <style:style style:name="P5" style:family="paragraph" style:parent-style-name="Standard">
      <style:text-properties officeooo:rsid="001d2b17" officeooo:paragraph-rsid="001d2b17"/>
    </style:style>
    <style:style style:name="P6" style:family="paragraph" style:parent-style-name="Standard">
      <style:text-properties officeooo:rsid="001e58c8" officeooo:paragraph-rsid="001e58c8"/>
    </style:style>
    <style:style style:name="P7" style:family="paragraph" style:parent-style-name="Standard">
      <style:text-properties officeooo:rsid="001f6c23" officeooo:paragraph-rsid="001f6c23"/>
    </style:style>
    <style:style style:name="P8" style:family="paragraph" style:parent-style-name="Standard">
      <style:text-properties officeooo:rsid="0021a4a8" officeooo:paragraph-rsid="0021a4a8"/>
    </style:style>
    <style:style style:name="P9" style:family="paragraph" style:parent-style-name="Standard">
      <style:text-properties officeooo:rsid="0021d651" officeooo:paragraph-rsid="0021d651"/>
    </style:style>
    <style:style style:name="P10" style:family="paragraph" style:parent-style-name="Standard">
      <style:text-properties officeooo:rsid="0021f6d1" officeooo:paragraph-rsid="0021f6d1"/>
    </style:style>
    <style:style style:name="P11" style:family="paragraph" style:parent-style-name="Standard">
      <style:text-properties officeooo:rsid="0021011d" officeooo:paragraph-rsid="0021011d"/>
    </style:style>
    <style:style style:name="T1" style:family="text">
      <style:text-properties officeooo:rsid="001b5a24"/>
    </style:style>
    <style:style style:name="T2" style:family="text">
      <style:text-properties officeooo:rsid="001e58c8"/>
    </style:style>
    <style:style style:name="T3" style:family="text">
      <style:text-properties officeooo:rsid="001e9ad2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ndere configurazione ads da unn json</text:p>
      <text:p text:style-name="Standard"/>
      <text:p text:style-name="Standard"/>
      <text:p text:style-name="Standard">mettere indirizzo plc amsnetid e porta, di olito 851</text:p>
      <text:p text:style-name="Standard"/>
      <text:p text:style-name="Standard"/>
      <text:p text:style-name="Standard">e nomi delle variabili</text:p>
      <text:p text:style-name="Standard"/>
      <text:p text:style-name="Standard"/>
      <text:p text:style-name="Standard">mettere polling time configurabile</text:p>
      <text:p text:style-name="Standard"/>
      <text:p text:style-name="Standard"/>
      <text:p text:style-name="Standard"/>
      <text:p text:style-name="Standard">indirizzo broker mqtt e porta e topic</text:p>
      <text:p text:style-name="Standard"/>
      <text:p text:style-name="Standard"/>
      <text:p text:style-name="Standard"/>
      <text:p text:style-name="Standard"/>
      <text:p text:style-name="P1">installo con:</text:p>
      <text:p text:style-name="P1"/>
      <text:p text:style-name="P1">dotnet add package Beckhoff.TwinCAT.Ads --version 7.0.172</text:p>
      <text:p text:style-name="P1"/>
      <text:p text:style-name="P1"/>
      <text:p text:style-name="P1"/>
      <text:p text:style-name="P1"/>
      <text:p text:style-name="P1"/>
      <text:p text:style-name="P1"/>
      <text:p text:style-name="P2">Dati da mettere nel json di configurazione:</text:p>
      <text:p text:style-name="P2"/>
      <text:p text:style-name="P2"/>
      <text:p text:style-name="P3">adress_plc</text:p>
      <text:p text:style-name="P3">port_plc</text:p>
      <text:p text:style-name="P2"/>
      <text:p text:style-name="P2"/>
      <text:p text:style-name="P3">port_mqtt</text:p>
      <text:p text:style-name="P3">adress_mqttBroker</text:p>
      <text:p text:style-name="P3">topic_mqtt</text:p>
      <text:p text:style-name="P3"/>
      <text:p text:style-name="P3"/>
      <text:p text:style-name="P3">var_name1</text:p>
      <text:p text:style-name="P3">var_name2</text:p>
      <text:p text:style-name="P3">var_name3</text:p>
      <text:p text:style-name="P3">var_name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magine6" text:anchor-type="char" svg:width="12.781cm" svg:height="12.067cm" draw:z-index="5"><draw:image xlink:href="Pictures/10000001000001E3000001C8953D63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icordarsi di mettere nelle variabilidi configurazione nel file di configurazione conf.json il prefisso <text:span text:style-name="T1">GVL_DataLogger. </text:span>Che è il nome del programma </text:p>
      <text:p text:style-name="P3"/>
      <text:p text:style-name="P3">"GVL_DataLogger.di1",</text:p>
      <text:p text:style-name="P3">"GVL_DataLogger.di2"</text:p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OME CONNETTERSI AL TRAPANO</text:p>
      <text:p text:style-name="P5"/>
      <text:p text:style-name="P5"/>
      <text:p text:style-name="P5"/>
      <text:p text:style-name="P5">-<text:span text:style-name="T2">ricordarsi sempre di spegnere il PLC dal panello HMI, come si spegne un computer windows normale, e poi di spegnerlo con il selettore rosso.</text:span></text:p>
      <text:p text:style-name="P5"/>
      <text:p text:style-name="P5"/>
      <text:p text:style-name="P5"/>
      <text:p text:style-name="P5"/>
      <text:p text:style-name="P6">Bisogna conettere il PC al PlC con un <text:span text:style-name="T3">cavo ethernet</text:span></text:p>
      <text:p text:style-name="P6"/>
      <text:p text:style-name="P6"/>
      <text:p text:style-name="P7"><draw:frame draw:style-name="fr2" draw:name="Immagine1" text:anchor-type="char" svg:width="17cm" svg:height="10.62cm" draw:z-index="0"><draw:image xlink:href="Pictures/100000010000077F000004AF23588025.png" xlink:type="simple" xlink:show="embed" xlink:actuate="onLoad" draw:mime-type="image/png"/></draw:frame>ci si assicura che il PC sia conesso alla rete via cavo ethernet e che abbia un indirizzo IP diverso dal PLC</text:p>
      <text:p text:style-name="P7"/>
      <text:p text:style-name="P7"/>
      <text:p text:style-name="P7"/>
      <text:p text:style-name="P8">si attiva il PLC premendo il tasto blu in basso a destra nel menu del HMI che poi diventerà verde</text:p>
      <text:p text:style-name="P8"/>
      <text:p text:style-name="P8"><text:soft-page-break/>ci si potrebbe già conettere in teoria, le seguenti indicazioni sono per <text:span text:style-name="T4">connettersi con TWINCAT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rima di tutto si crea una nuova ruote se non già fatto, facendo:</text:p>
      <text:p text:style-name="P9"><text:soft-page-break/></text:p>
      <text:p text:style-name="P9"/>
      <text:p text:style-name="P8"/>
      <text:p text:style-name="P8"><draw:frame draw:style-name="fr1" draw:name="Immagine4" text:anchor-type="char" svg:width="15.665cm" svg:height="13.972cm" draw:z-index="3"><draw:image xlink:href="Pictures/1000000100000250000002101AA0AF18.png" xlink:type="simple" xlink:show="embed" xlink:actuate="onLoad" draw:mime-type="image/png"/></draw:frame></text:p>
      <text:p text:style-name="P8"/>
      <text:p text:style-name="P9">edit ruotes</text:p>
      <text:p text:style-name="P9"/>
      <text:p text:style-name="P9"/>
      <text:p text:style-name="P9"><draw:frame draw:style-name="fr2" draw:name="Immagine5" text:anchor-type="char" svg:width="17cm" svg:height="7.925cm" draw:z-index="4"><draw:image xlink:href="Pictures/1000000100000698000003130B3B9CF0.png" xlink:type="simple" xlink:show="embed" xlink:actuate="onLoad" draw:mime-type="image/png"/></draw:frame><text:soft-page-break/></text:p>
      <text:p text:style-name="P8"/>
      <text:p text:style-name="P10">si fa add, poi si fa “enter new host” dopo aver scritto l’indirizzo ip del PLC dentro la barra, è importanta anche settare l’impostazione sotto come “IP adress” e non come “host name”</text:p>
      <text:p text:style-name="P8"/>
      <text:p text:style-name="P8"/>
      <text:p text:style-name="P8"/>
      <text:p text:style-name="P8"/>
      <text:p text:style-name="P8"/>
      <text:p text:style-name="P7"><draw:frame draw:style-name="fr1" draw:name="Immagine2" text:anchor-type="char" svg:width="15.473cm" svg:height="9.758cm" draw:z-index="1"><draw:image xlink:href="Pictures/10000000000002DB000001CD5C95F138.png" xlink:type="simple" xlink:show="embed" xlink:actuate="onLoad" draw:mime-type="image/png"/></draw:frame></text:p>
      <text:p text:style-name="P7"/>
      <text:p text:style-name="P11">si avvia il PLC premendo il tasto verde nella foto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8"><draw:frame draw:style-name="fr1" draw:name="Immagine3" text:anchor-type="char" svg:width="15.79cm" svg:height="8.763cm" draw:z-index="2"><draw:image xlink:href="Pictures/10000000000002EA0000019EB4A89317.png" xlink:type="simple" xlink:show="embed" xlink:actuate="onLoad" draw:mime-type="image/png"/></draw:frame>si può fare login e modificare certe variabili di stato del PL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08:58:46.409526200</meta:creation-date>
    <dc:date>2026-04-17T17:19:04.874058900</dc:date>
    <meta:editing-duration>PT1H1M47S</meta:editing-duration>
    <meta:editing-cycles>12</meta:editing-cycles>
    <meta:generator>LibreOffice/25.8.5.2$Windows_X86_64 LibreOffice_project/9c8b85f387cc00a89945a79c9e6239f32e450ac2</meta:generator>
    <meta:document-statistic meta:table-count="0" meta:image-count="6" meta:object-count="0" meta:page-count="7" meta:paragraph-count="31" meta:word-count="242" meta:character-count="1468" meta:non-whitespace-character-count="1257"/>
  </office:meta>
</office:document-meta>
</file>