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3C000000BA79B9E1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5fd" officeooo:paragraph-rsid="0006c5fd"/>
    </style:style>
    <style:style style:name="P2" style:family="paragraph" style:parent-style-name="Standard">
      <style:text-properties officeooo:rsid="0015d283" officeooo:paragraph-rsid="0015d283"/>
    </style:style>
    <style:style style:name="P3" style:family="paragraph" style:parent-style-name="Standard">
      <style:text-properties officeooo:rsid="0007b0db" officeooo:paragraph-rsid="0007b0db"/>
    </style:style>
    <style:style style:name="P4" style:family="paragraph" style:parent-style-name="Standard">
      <style:text-properties officeooo:rsid="000d55bd" officeooo:paragraph-rsid="000d55bd"/>
    </style:style>
    <style:style style:name="P5" style:family="paragraph" style:parent-style-name="Standard">
      <style:text-properties officeooo:rsid="0010c05e" officeooo:paragraph-rsid="0010c05e"/>
    </style:style>
    <style:style style:name="P6" style:family="paragraph" style:parent-style-name="Standard">
      <style:text-properties fo:font-weight="bold" officeooo:rsid="000d55bd" officeooo:paragraph-rsid="000d55bd" style:font-weight-asian="bold" style:font-weight-complex="bold"/>
    </style:style>
    <style:style style:name="P7" style:family="paragraph" style:parent-style-name="Standard">
      <style:text-properties officeooo:rsid="000b9051" officeooo:paragraph-rsid="000b9051"/>
    </style:style>
    <style:style style:name="P8" style:family="paragraph" style:parent-style-name="Standard">
      <style:text-properties fo:font-weight="bold" officeooo:rsid="000b9051" officeooo:paragraph-rsid="000b9051" style:font-weight-asian="bold" style:font-weight-complex="bold"/>
    </style:style>
    <style:style style:name="P9" style:family="paragraph" style:parent-style-name="Standard">
      <style:text-properties officeooo:rsid="0018167a" officeooo:paragraph-rsid="0018167a"/>
    </style:style>
    <style:style style:name="P10" style:family="paragraph" style:parent-style-name="Standard">
      <style:text-properties fo:font-weight="bold" officeooo:rsid="0018167a" officeooo:paragraph-rsid="0018167a" style:font-weight-asian="bold" style:font-weight-complex="bold"/>
    </style:style>
    <style:style style:name="P11" style:family="paragraph" style:parent-style-name="Standard">
      <style:text-properties fo:font-weight="normal" officeooo:rsid="001861df" officeooo:paragraph-rsid="001861df" style:font-weight-asian="normal" style:font-weight-complex="normal"/>
    </style:style>
    <style:style style:name="P12" style:family="paragraph" style:parent-style-name="Standard">
      <style:text-properties officeooo:rsid="00123427" officeooo:paragraph-rsid="001234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9b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a in c# che da dei dati dei dati li manda in MQTT</text:p>
      <text:p text:style-name="P1"/>
      <text:p text:style-name="P2">i dati devono essere presi con ADS dal PLC, questo programma fa solo da via di mezzo</text:p>
      <text:p text:style-name="P1"/>
      <text:p text:style-name="P1"/>
      <text:p text:style-name="P3">faccio questi pasaggi consigliati da chat per programmare c# in visual studio code</text:p>
      <text:p text:style-name="P3"/>
      <text:p text:style-name="P3"/>
      <text:p text:style-name="P3"/>
      <text:p text:style-name="P3"/>
      <text:p text:style-name="P3"/>
      <text:p text:style-name="P4">progetto nuovo in versione 8 per farla funzionare con la libreria mqtt</text:p>
      <text:p text:style-name="P4"/>
      <text:p text:style-name="P4"/>
      <text:p text:style-name="P5">per preparare tutto scrivere nella console di visual studio code:</text:p>
      <text:p text:style-name="P4"/>
      <text:p text:style-name="P6">dotnet new console -n MioProgramma -f net8.0</text:p>
      <text:p text:style-name="P7"/>
      <text:p text:style-name="P7">Poi entra nella cartella:</text:p>
      <text:p text:style-name="P8">cd MioProgramma</text:p>
      <text:p text:style-name="P7"/>
      <text:p text:style-name="P7"/>
      <text:p text:style-name="P9">installo la libreria mqtt di dot net configurare</text:p>
      <text:p text:style-name="P9"/>
      <text:p text:style-name="P10">dotnet add package MQTTnet</text:p>
      <text:p text:style-name="P10"/>
      <text:p text:style-name="P10"/>
      <text:p text:style-name="P11">apro il file <text:span text:style-name="T1">.csproj</text:span> e modifoc la versione di MQTTnet (se no non si compila)</text:p>
      <text:p text:style-name="P11"/>
      <text:p text:style-name="P11"><text:s text:c="3"/><text:span text:style-name="T1"><text:s/>&lt;PackageReference Include="MQTTnet" Version="4.3.7.1207" /&gt;</text:span></text:p>
      <text:p text:style-name="P7"/>
      <text:p text:style-name="P5"><text:span text:style-name="T1">dontnet clean</text:span> <text:s text:c="3"/>o <text:s/><text:span text:style-name="T1">dotnet restore</text:span> <text:s text:c="3"/>per mettere aposto eventuali problemi di compilazione</text:p>
      <text:p text:style-name="P5"/>
      <text:p text:style-name="P5"/>
      <text:p text:style-name="P12">poi per compilare tutto fare <text:span text:style-name="T1">dotnet build</text:span></text:p>
      <text:p text:style-name="P12"/>
      <text:p text:style-name="P12"/>
      <text:p text:style-name="P12">e per avviare fare <text:span text:style-name="T1">dotnet run</text:span></text:p>
      <text:p text:style-name="P7"/>
      <text:p text:style-name="P7"/>
      <text:p text:style-name="P12">poi installare server mosquito che è il broker mqtt installato in locale, non serve configurare null’altro</text:p>
      <text:p text:style-name="P12"/>
      <text:p text:style-name="P12">poi in node red fare il semplice programma di polling di node red con <text:span text:style-name="T2">stampaggio di </text:span>debug delle informazioni <text:span text:style-name="T2">ricevute</text:span></text:p>
      <text:p text:style-name="P7"/>
      <text:p text:style-name="P4"><draw:frame draw:style-name="fr1" draw:name="Immagine1" text:anchor-type="char" svg:width="15.136cm" svg:height="4.921cm" draw:z-index="0"><draw:image xlink:href="Pictures/100000010000023C000000BA79B9E17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5:43:55.937033400</meta:creation-date>
    <dc:date>2026-04-08T17:18:42.938828700</dc:date>
    <meta:editing-duration>PT1H24M31S</meta:editing-duration>
    <meta:editing-cycles>13</meta:editing-cycles>
    <meta:generator>LibreOffice/25.8.5.2$Windows_X86_64 LibreOffice_project/9c8b85f387cc00a89945a79c9e6239f32e450ac2</meta:generator>
    <meta:document-statistic meta:table-count="0" meta:image-count="1" meta:object-count="0" meta:page-count="2" meta:paragraph-count="17" meta:word-count="170" meta:character-count="1039" meta:non-whitespace-character-count="875"/>
  </office:meta>
</office:document-meta>
</file>