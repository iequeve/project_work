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2000002B4C1E1D2B5.png" manifest:media-type="image/png"/>
  <manifest:file-entry manifest:full-path="Pictures/10000001000004C80000029E4B9936A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3b1" officeooo:paragraph-rsid="000ef3b1"/>
    </style:style>
    <style:style style:name="P2" style:family="paragraph" style:parent-style-name="Standard">
      <style:text-properties officeooo:rsid="0010a1eb" officeooo:paragraph-rsid="0010a1eb"/>
    </style:style>
    <style:style style:name="P3" style:family="paragraph" style:parent-style-name="Standard">
      <style:text-properties officeooo:rsid="00110c38" officeooo:paragraph-rsid="00110c3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collegarsi con dekstop remoto al trapano</text:p>
      <text:p text:style-name="P1"/>
      <text:p text:style-name="P1">collegarsi con la scheda rete al computer</text:p>
      <text:p text:style-name="P1"/>
      <text:p text:style-name="P1">cercare<draw:frame draw:style-name="fr1" draw:name="Immagine1" text:anchor-type="char" svg:width="16.141cm" svg:height="18.311cm" draw:z-index="0"><draw:image xlink:href="Pictures/1000000100000262000002B4C1E1D2B5.png" xlink:type="simple" xlink:show="embed" xlink:actuate="onLoad" draw:mime-type="image/png"/></draw:frame> desktop remoto su start sul proprio computer (attivarlo da impostazioni prima se non lo si ha fatto) ed accedere con le seguenti credenziali, la <text:span text:style-name="T1">password</text:span> è 1</text:p>
      <text:p text:style-name="P1"/>
      <text:p text:style-name="P1"/>
      <text:p text:style-name="P1"/>
      <text:p text:style-name="P2">per farlo funzionare bisogna andare sotto questa cartella qui “dotnet 6” e premere sul file eseguibile, bisogna assicuarsi che il file json.conf s nella stessa cartella dell’eseguibile</text:p>
      <text:p text:style-name="P2"/>
      <text:p text:style-name="P2"/>
      <text:p text:style-name="P3"><draw:frame draw:style-name="fr2" draw:name="Immagine2" text:anchor-type="char" svg:width="17cm" svg:height="9.305cm" draw:z-index="1"><draw:image xlink:href="Pictures/10000001000004C80000029E4B9936A5.png" xlink:type="simple" xlink:show="embed" xlink:actuate="onLoad" draw:mime-type="image/png"/></draw:frame><text:soft-page-break/>cartella dell’eseguibil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4:45:23.575892500</meta:creation-date>
    <dc:date>2026-05-08T15:15:25.321231000</dc:date>
    <meta:editing-duration>PT30M</meta:editing-duration>
    <meta:editing-cycles>4</meta:editing-cycles>
    <meta:generator>LibreOffice/25.8.5.2$Windows_X86_64 LibreOffice_project/9c8b85f387cc00a89945a79c9e6239f32e450ac2</meta:generator>
    <meta:document-statistic meta:table-count="0" meta:image-count="2" meta:object-count="0" meta:page-count="2" meta:paragraph-count="5" meta:word-count="71" meta:character-count="459" meta:non-whitespace-character-count="393"/>
  </office:meta>
</office:document-meta>
</file>