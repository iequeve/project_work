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D1000002AC7320407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IBMPlexMono" svg:font-family="IBMPlexMono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0f26" officeooo:paragraph-rsid="000f0f26"/>
    </style:style>
    <style:style style:name="P2" style:family="paragraph" style:parent-style-name="Standard">
      <style:text-properties fo:color="#f8f8f8" loext:opacity="100%" style:font-name="IBMPlexMono" fo:font-size="9.75pt" fo:font-weight="normal" officeooo:rsid="000f0f26" officeooo:paragraph-rsid="000f0f26" fo:background-color="#1a1a2a"/>
    </style:style>
    <style:style style:name="P3" style:family="paragraph" style:parent-style-name="Standard">
      <style:paragraph-properties fo:margin-left="0cm" fo:margin-right="0cm" style:line-height-at-least="0.476cm" fo:text-indent="0cm" style:auto-text-indent="false"/>
      <style:text-properties fo:color="#f8f8f8" loext:opacity="100%" style:font-name="IBMPlexMono" fo:font-size="9.75pt" fo:font-weight="normal" fo:background-color="#1a1a2a"/>
    </style:style>
    <style:style style:name="P4" style:family="paragraph" style:parent-style-name="Standard">
      <style:paragraph-properties fo:margin-left="0cm" fo:margin-right="0cm" style:line-height-at-least="0.476cm" fo:text-indent="0cm" style:auto-text-indent="false"/>
      <style:text-properties fo:color="#9394ff" loext:opacity="100%" style:font-name="IBMPlexMono" fo:font-size="9.75pt" fo:font-weight="normal" fo:background-color="#1a1a2a"/>
    </style:style>
    <style:style style:name="P5" style:family="paragraph" style:parent-style-name="Standard">
      <style:text-properties officeooo:rsid="000f0f26" officeooo:paragraph-rsid="0011f8e8"/>
    </style:style>
    <style:style style:name="P6" style:family="paragraph" style:parent-style-name="Standard">
      <style:text-properties officeooo:rsid="0011f8e8" officeooo:paragraph-rsid="0011f8e8"/>
    </style:style>
    <style:style style:name="P7" style:family="paragraph" style:parent-style-name="Standard">
      <style:text-properties officeooo:rsid="001247d9" officeooo:paragraph-rsid="001247d9"/>
    </style:style>
    <style:style style:name="P8" style:family="paragraph" style:parent-style-name="Standard">
      <style:text-properties fo:color="#000000" loext:opacity="100%" style:font-name="Consolas" fo:font-size="10.5pt" fo:font-weight="normal" officeooo:rsid="001247d9" officeooo:paragraph-rsid="001247d9" fo:background-color="#fffffe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e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e"/>
    </style:style>
    <style:style style:name="P11" style:family="paragraph" style:parent-style-name="Standard">
      <style:text-properties officeooo:rsid="001310af" officeooo:paragraph-rsid="001310af"/>
    </style:style>
    <style:style style:name="T1" style:family="text">
      <style:text-properties officeooo:rsid="0011f8e8"/>
    </style:style>
    <style:style style:name="T2" style:family="text">
      <style:text-properties fo:color="#9394ff" loext:opacity="100%"/>
    </style:style>
    <style:style style:name="T3" style:family="text">
      <style:text-properties fo:color="#ffb6a0" loext:opacity="100%"/>
    </style:style>
    <style:style style:name="T4" style:family="text">
      <style:text-properties fo:color="#7ce490" loext:opacity="100%"/>
    </style:style>
    <style:style style:name="T5" style:family="text">
      <style:text-properties fo:color="#6bdfff" loext:opacity="100%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a31515" loext:opacity="100%" style:font-name="Consolas" fo:font-size="10.5pt" fo:font-weight="normal"/>
    </style:style>
    <style:style style:name="T8" style:family="text">
      <style:text-properties fo:color="#098658" loext:opacity="100%" style:font-name="Consolas" fo:font-size="10.5pt" fo:font-weight="normal"/>
    </style:style>
    <style:style style:name="T9" style:family="text">
      <style:text-properties fo:color="#0451a5" loext:opacity="100%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lwErHyef9uclSQcYe_zLSCge_FMPhHfNV_TZcfC7wuiJYhpbeOKtlkJK2SOV_H5rIV1O4FSU9BPftRkfRtR-g==</text:p>
      <text:p text:style-name="Standard"/>
      <text:p text:style-name="Standard"/>
      <text:p text:style-name="Standard"><draw:frame draw:style-name="fr1" draw:name="Immagine1" text:anchor-type="char" svg:width="8.645cm" svg:height="6.052cm" draw:z-index="0"><draw:image xlink:href="Pictures/10000001000003D1000002AC732040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mportante metttere su versione 2.0 del influx db</text:p>
      <text:p text:style-name="P1"/>
      <text:p text:style-name="P1"/>
      <text:p text:style-name="P1"/>
      <text:p text:style-name="P1">-<text:span text:style-name="T1">nella pagina data explorer di influx db si possono estrarre i dati dei vari bucket con un programma sql</text:span></text:p>
      <text:p text:style-name="P1"/>
      <text:p text:style-name="P1"/>
      <text:p text:style-name="P1"/>
      <text:p text:style-name="P2"><text:span text:style-name="T2">SELECT</text:span> <text:span text:style-name="T3">*</text:span></text:p>
      <text:p text:style-name="P3"><text:span text:style-name="T2">FROM</text:span> <text:span text:style-name="T4">"temperature"</text:span></text:p>
      <text:p text:style-name="P4">WHERE</text:p>
      <text:p text:style-name="P3"><text:span text:style-name="T4">time</text:span> <text:span text:style-name="T3">&gt;=</text:span> now<text:span text:style-name="T5">()</text:span> <text:span text:style-name="T3">-</text:span> <text:span text:style-name="T4">interval</text:span> <text:span text:style-name="T4">'1 hour'</text:span></text:p>
      <text:p text:style-name="P1"/>
      <text:p text:style-name="P1"/>
      <text:p text:style-name="P5"/>
      <text:p text:style-name="P6">questo ad’esempio lista tutti gli elementi temperature</text:p>
      <text:p text:style-name="P6"/>
      <text:p text:style-name="P6"/>
      <text:p text:style-name="P6"/>
      <text:p text:style-name="P7">i dati inviati con inject su node red sono:</text:p>
      <text:p text:style-name="P7"/>
      <text:p text:style-name="P7"/>
      <text:p text:style-name="P8">[</text:p>
      <text:p text:style-name="P9">    <text:span text:style-name="T6">{</text:span></text:p>
      <text:p text:style-name="P9">        <text:span text:style-name="T7">"temperature"</text:span><text:span text:style-name="T6">: </text:span><text:span text:style-name="T8">24</text:span></text:p>
      <text:p text:style-name="P9">    <text:span text:style-name="T6">},</text:span></text:p>
      <text:p text:style-name="P9">    <text:span text:style-name="T6">{</text:span></text:p>
      <text:p text:style-name="P9">        <text:span text:style-name="T7">"device"</text:span><text:span text:style-name="T6">: </text:span><text:span text:style-name="T9">"dQBgXeWLRE"</text:span><text:span text:style-name="T6">,</text:span></text:p>
      <text:p text:style-name="P9">        <text:span text:style-name="T7">"deviceType"</text:span><text:span text:style-name="T6">: </text:span><text:span text:style-name="T9">"Pi4"</text:span><text:span text:style-name="T6">,</text:span></text:p>
      <text:p text:style-name="P9">        <text:span text:style-name="T7">"deviceName"</text:span><text:span text:style-name="T6">: </text:span><text:span text:style-name="T9">"demo-pi-rob"</text:span></text:p>
      <text:p text:style-name="P9">    <text:span text:style-name="T6">}</text:span></text:p>
      <text:p text:style-name="P10">]</text:p>
      <text:p text:style-name="P7"><text:soft-page-break/></text:p>
      <text:p text:style-name="P7"/>
      <text:p text:style-name="P7"/>
      <text:p text:style-name="P7"/>
      <text:p text:style-name="P7"/>
      <text:p text:style-name="P11">installato questo per simulare i dati ambientali in node-red</text:p>
      <text:p text:style-name="P11"/>
      <text:p text:style-name="P11"><text:a xlink:type="simple" xlink:href="https://flows.nodered.org/node/node-red-node-pi-sense-hat-simulator" text:style-name="Internet_20_link" text:visited-style-name="Visited_20_Internet_20_Link">https://flows.nodered.org/node/node-red-node-pi-sense-hat-simulator</text:a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IBMPlexMono" svg:font-family="IBMPlexMono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09:46:35.730707800</meta:creation-date>
    <dc:date>2026-03-25T10:16:06.527899000</dc:date>
    <meta:editing-duration>PT18M50S</meta:editing-duration>
    <meta:editing-cycles>4</meta:editing-cycles>
    <meta:generator>LibreOffice/25.8.5.2$Windows_X86_64 LibreOffice_project/9c8b85f387cc00a89945a79c9e6239f32e450ac2</meta:generator>
    <meta:document-statistic meta:table-count="0" meta:image-count="1" meta:object-count="0" meta:page-count="2" meta:paragraph-count="21" meta:word-count="80" meta:character-count="671" meta:non-whitespace-character-count="564"/>
  </office:meta>
</office:document-meta>
</file>