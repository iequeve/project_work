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fccd" officeooo:paragraph-rsid="0015fccd"/>
    </style:style>
    <style:style style:name="P2" style:family="paragraph" style:parent-style-name="Standard">
      <style:text-properties officeooo:rsid="00178e06" officeooo:paragraph-rsid="00178e06"/>
    </style:style>
    <style:style style:name="P3" style:family="paragraph" style:parent-style-name="Standard">
      <style:text-properties officeooo:rsid="00178e06" officeooo:paragraph-rsid="00185cc8"/>
    </style:style>
    <style:style style:name="P4" style:family="paragraph" style:parent-style-name="Standard">
      <style:text-properties officeooo:rsid="00185cc8" officeooo:paragraph-rsid="00185cc8"/>
    </style:style>
    <style:style style:name="T1" style:family="text">
      <style:text-properties officeooo:rsid="00185c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CONTENERSI AL TORNIO</text:p>
      <text:p text:style-name="P1"/>
      <text:p text:style-name="P1">IP del PLC</text:p>
      <text:p text:style-name="P1"/>
      <text:p text:style-name="P1">"ams_netId": "5.132.156.100.1.1",</text:p>
      <text:p text:style-name="P1">"port_ads": 851</text:p>
      <text:p text:style-name="P1"/>
      <text:p text:style-name="P1"/>
      <text:p text:style-name="P1"/>
      <text:p text:style-name="P2">Come connettersi tramite desktop remoto</text:p>
      <text:p text:style-name="P2"/>
      <text:p text:style-name="P2"/>
      <text:p text:style-name="P3"><text:span text:style-name="T1">computer: <text:s text:c="2"/></text:span>CX-849C64</text:p>
      <text:p text:style-name="P3"/>
      <text:p text:style-name="P3"/>
      <text:p text:style-name="P4">user: DESKTOP-EI0FQLG\Administrator</text:p>
      <text:p text:style-name="P4"/>
      <text:p text:style-name="P4"/>
      <text:p text:style-name="P4">pdw: 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1T12:03:01.119951800</meta:creation-date>
    <dc:date>2026-05-11T12:15:47.275537800</dc:date>
    <meta:editing-duration>PT12M45S</meta:editing-duration>
    <meta:editing-cycles>3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8" meta:word-count="22" meta:character-count="184" meta:non-whitespace-character-count="168"/>
  </office:meta>
</office:document-meta>
</file>