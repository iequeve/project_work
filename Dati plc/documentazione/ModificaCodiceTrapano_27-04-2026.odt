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7872" officeooo:paragraph-rsid="00027872"/>
    </style:style>
    <style:style style:name="P2" style:family="paragraph" style:parent-style-name="Standard">
      <style:text-properties fo:font-weight="bold" officeooo:rsid="00027872" officeooo:paragraph-rsid="00027872" style:font-weight-asian="bold" style:font-weight-complex="bold"/>
    </style:style>
    <style:style style:name="P3" style:family="paragraph" style:parent-style-name="Standard">
      <style:text-properties fo:font-weight="normal" officeooo:rsid="00027872" officeooo:paragraph-rsid="00027872" style:font-weight-asian="normal" style:font-weight-complex="normal"/>
    </style:style>
    <style:style style:name="P4" style:family="paragraph" style:parent-style-name="Standard">
      <style:text-properties fo:font-weight="normal" officeooo:rsid="00027872" officeooo:paragraph-rsid="00057bb0" style:font-weight-asian="normal" style:font-weight-complex="normal"/>
    </style:style>
    <style:style style:name="P5" style:family="paragraph" style:parent-style-name="Standard">
      <style:text-properties fo:font-weight="normal" officeooo:rsid="00099c36" officeooo:paragraph-rsid="00099c36" style:font-weight-asian="normal" style:font-weight-complex="normal"/>
    </style:style>
    <style:style style:name="P6" style:family="paragraph" style:parent-style-name="Standard">
      <style:text-properties fo:font-weight="normal" officeooo:rsid="000e8dae" officeooo:paragraph-rsid="000e8dae"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037edd"/>
    </style:style>
    <style:style style:name="T4" style:family="text">
      <style:text-properties officeooo:rsid="0003ce30"/>
    </style:style>
    <style:style style:name="T5" style:family="text">
      <style:text-properties officeooo:rsid="00057bb0"/>
    </style:style>
    <style:style style:name="T6" style:family="text">
      <style:text-properties officeooo:rsid="000c9ad5"/>
    </style:style>
    <style:style style:name="T7" style:family="text">
      <style:text-properties officeooo:rsid="0006bb06"/>
    </style:style>
    <style:style style:name="T8" style:family="text">
      <style:text-properties fo:font-weight="bold" officeooo:rsid="0006bb06" style:font-weight-asian="bold" style:font-weight-complex="bold"/>
    </style:style>
    <style:style style:name="T9" style:family="text">
      <style:text-properties officeooo:rsid="0010619e"/>
    </style:style>
    <style:style style:name="T10" style:family="text">
      <style:text-properties officeooo:rsid="00119cc5"/>
    </style:style>
    <style:style style:name="T11" style:family="text">
      <style:text-properties officeooo:rsid="0013440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E FUNZIONA IL PROGRAMMA DEL TRAPANO</text:p>
      <text:p text:style-name="P1"/>
      <text:p text:style-name="P1"/>
      <text:p text:style-name="P1"/>
      <text:p text:style-name="P1"/>
      <text:p text:style-name="P2">rawSignal <text:span text:style-name="T1">è un array che contiene 10 valori int preso direttamente dagli ingressi digitali del PLC ed e corrisponde a valori da 0 a 31267, se prende valori simili allo 0 o comunque meno della metà di 31267 è considerato come segnale basso (tende ad avere valori sul 60/50 in questo caso), se invece ha valori che si avvicinano al 31267 è alto.</text:span></text:p>
      <text:p text:style-name="P3"/>
      <text:p text:style-name="P3"/>
      <text:p text:style-name="P4"><text:span text:style-name="T2">SquareWave</text:span> <text:span text:style-name="T3">è un array che </text:span><text:span text:style-name="T4">contiene 10 valori di tipo bool ottenuti </text:span><text:span text:style-name="T5">associando il valore corrispondente trovat</text:span><text:span text:style-name="T6">o</text:span><text:span text:style-name="T5"> nell’array </text:span><text:span text:style-name="T2">rawSignal</text:span>, <text:span text:style-name="T7">tutto questo viene fatto nel file programma </text:span><text:span text:style-name="T8">POUs\FB_SpeedSignal.TcPOU</text:span><text:span text:style-name="T7">.</text:span></text:p>
      <text:p text:style-name="P4"/>
      <text:p text:style-name="P4"/>
      <text:p text:style-name="P4"/>
      <text:p text:style-name="P5">Alla seguente configurazione il trapano ruota a 1500 giri al minuto, questo significa che va a 25 Hz, considerando che la vite (parte magnetica messa nella puleggia del rotore che viene rilevata dal sensore) occupa circa un 20 esimo della puleggia, ci conviene avere una frequenza di campionamento ideale di 20*25 = 500.</text:p>
      <text:p text:style-name="P5"/>
      <text:p text:style-name="P5"/>
      <text:p text:style-name="P5"/>
      <text:p text:style-name="P6">Bisogna:</text:p>
      <text:p text:style-name="P6">-trovare un modo di calcolare la potenza consumata</text:p>
      <text:p text:style-name="P6">-<text:span text:style-name="T9">mettere a posto il cablaggio della cella di carico e capire a cosa è collegata</text:span></text:p>
      <text:p text:style-name="P6">-<text:span text:style-name="T10">inviare i dati in continuo al mqtt </text:span><text:span text:style-name="T11">aggiungendo un loop al c#</text:span></text:p>
      <text:p text:style-name="P6"/>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7T15:31:17.435019800</meta:creation-date>
    <meta:generator>LibreOffice/25.8.5.2$Windows_X86_64 LibreOffice_project/9c8b85f387cc00a89945a79c9e6239f32e450ac2</meta:generator>
    <dc:date>2026-04-27T17:12:40.918537600</dc:date>
    <meta:editing-duration>PT1H41M16S</meta:editing-duration>
    <meta:editing-cycles>13</meta:editing-cycles>
    <meta:document-statistic meta:table-count="0" meta:image-count="0" meta:object-count="0" meta:page-count="1" meta:paragraph-count="8" meta:word-count="185" meta:character-count="1102" meta:non-whitespace-character-count="925"/>
  </office:meta>
</office:document-meta>
</file>